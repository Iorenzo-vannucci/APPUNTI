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automatic-styles>
    <style:style style:name="P1" style:family="paragraph" style:parent-style-name="Standard" style:list-style-name="L1">
      <style:text-properties style:font-name="FreeSans" fo:font-size="14pt" officeooo:rsid="001256be" officeooo:paragraph-rsid="001256be" style:font-size-asian="14pt" style:font-size-complex="14pt"/>
    </style:style>
    <style:style style:name="P2" style:family="paragraph" style:parent-style-name="Standard" style:list-style-name="L1">
      <style:text-properties style:font-name="FreeSans" fo:font-size="14pt" officeooo:rsid="001256be" officeooo:paragraph-rsid="001cca4b" style:font-size-asian="14pt" style:font-size-complex="14pt"/>
    </style:style>
    <style:style style:name="P3" style:family="paragraph" style:parent-style-name="Standard" style:list-style-name="L1">
      <style:text-properties style:font-name="FreeSans" fo:font-size="14pt" officeooo:rsid="001256be" officeooo:paragraph-rsid="001ea7e9" style:font-size-asian="14pt" style:font-size-complex="14pt"/>
    </style:style>
    <style:style style:name="P4" style:family="paragraph" style:parent-style-name="Standard" style:list-style-name="L2">
      <style:text-properties style:font-name="FreeSans" fo:font-size="14pt" officeooo:rsid="001256be" officeooo:paragraph-rsid="001256be" style:font-size-asian="14pt" style:font-size-complex="14pt"/>
    </style:style>
    <style:style style:name="P5" style:family="paragraph" style:parent-style-name="Standard" style:list-style-name="L2">
      <style:text-properties style:font-name="FreeSans" fo:font-size="14pt" officeooo:rsid="001256be" officeooo:paragraph-rsid="00151f95" style:font-size-asian="14pt" style:font-size-complex="14pt"/>
    </style:style>
    <style:style style:name="P6" style:family="paragraph" style:parent-style-name="Standard">
      <style:text-properties style:font-name="FreeSans" fo:font-size="14pt" officeooo:rsid="001256be" officeooo:paragraph-rsid="0021698e" style:font-size-asian="14pt" style:font-size-complex="14pt"/>
    </style:style>
    <style:style style:name="P7" style:family="paragraph" style:parent-style-name="Standard" style:list-style-name="L1">
      <style:text-properties style:font-name="FreeSans" fo:font-size="14pt" officeooo:rsid="001ea7e9" officeooo:paragraph-rsid="001ea7e9" style:font-size-asian="14pt" style:font-size-complex="14pt"/>
    </style:style>
    <style:style style:name="P8" style:family="paragraph" style:parent-style-name="Standard" style:list-style-name="L1">
      <style:text-properties style:font-name="FreeSans" fo:font-size="14pt" officeooo:rsid="0021698e" officeooo:paragraph-rsid="0021698e" style:font-size-asian="14pt" style:font-size-complex="14pt"/>
    </style:style>
    <style:style style:name="P9" style:family="paragraph" style:parent-style-name="Standard">
      <style:text-properties style:font-name="FreeSans" fo:font-size="14pt" officeooo:rsid="0021698e" officeooo:paragraph-rsid="0021698e" style:font-size-asian="14pt" style:font-size-complex="14pt"/>
    </style:style>
    <style:style style:name="P10" style:family="paragraph" style:parent-style-name="Standard" style:list-style-name="L1">
      <style:text-properties style:font-name="FreeSans" fo:font-size="14pt" officeooo:rsid="0021a4fd" officeooo:paragraph-rsid="0021a4fd" style:font-size-asian="14pt" style:font-size-complex="14pt"/>
    </style:style>
    <style:style style:name="P11" style:family="paragraph" style:parent-style-name="Standard" style:list-style-name="L1">
      <style:text-properties style:font-name="FreeSans" fo:font-size="14pt" officeooo:rsid="00239769" officeooo:paragraph-rsid="00239769" style:font-size-asian="14pt" style:font-size-complex="14pt"/>
    </style:style>
    <style:style style:name="P12" style:family="paragraph" style:parent-style-name="Standard">
      <style:text-properties style:font-name="FreeSans" fo:font-size="14pt" officeooo:rsid="00239769" officeooo:paragraph-rsid="0023976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font-weight="bold" officeooo:rsid="001256be" officeooo:paragraph-rsid="001256b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font-weight="bold" officeooo:rsid="0021698e" officeooo:paragraph-rsid="0021698e" style:font-size-asian="14pt" style:font-weight-asian="bold" style:font-size-complex="14pt" style:font-weight-complex="bold"/>
    </style:style>
    <style:style style:name="T1" style:family="text">
      <style:text-properties officeooo:rsid="0016f5c8"/>
    </style:style>
    <style:style style:name="T2" style:family="text">
      <style:text-properties officeooo:rsid="001b59c3"/>
    </style:style>
    <style:style style:name="T3" style:family="text">
      <style:text-properties officeooo:rsid="001cca4b"/>
    </style:style>
    <style:style style:name="T4" style:family="text">
      <style:text-properties officeooo:rsid="001ea7e9"/>
    </style:style>
    <style:style style:name="T5" style:family="text">
      <style:text-properties officeooo:rsid="00206ea1"/>
    </style:style>
    <style:style style:name="T6" style:family="text">
      <style:text-properties officeooo:rsid="0021698e"/>
    </style:style>
    <style:style style:name="T7" style:family="text">
      <style:text-properties officeooo:rsid="0021a4fd"/>
    </style:style>
    <style:style style:name="T8" style:family="text">
      <style:text-properties officeooo:rsid="0025899d"/>
    </style:style>
    <style:style style:name="T9" style:family="text">
      <style:text-properties officeooo:rsid="0027a7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MANDE <text:span text:style-name="T6">UTILI PER LA</text:span></text:p>
      <text:p text:style-name="P14">PREPARAZIONE DELL’ESONERO DI <text:line-break/>INTRODUZIONE ALL’INTELLIGENZA ARTIFICIALE</text:p>
      <text:p text:style-name="P13"/>
      <text:p text:style-name="P14">Domande a risposta aperta</text:p>
      <text:p text:style-name="P13"/>
      <text:list xml:id="list2438521978" text:style-name="L1">
        <text:list-item>
          <text:p text:style-name="P2">Descrivere, <text:span text:style-name="T2">preferibilmente in pseudocidice </text:span><text:span text:style-name="T3">e</text:span><text:span text:style-name="T2"> </text:span><text:span text:style-name="T3">corredato da un esempio</text:span><text:span text:style-name="T2">, </text:span><text:span text:style-name="T6">l’</text:span><text:span text:style-name="T2">algoritmo </text:span><text:span text:style-name="T6">X</text:span><text:span text:style-name="T2"> specificando </text:span><text:span text:style-name="T4">le caratteristiche generali dell’algoritmo, </text:span><text:span text:style-name="T2">l</text:span><text:span text:style-name="T4">a</text:span><text:span text:style-name="T2"> struttur</text:span><text:span text:style-name="T4">a</text:span><text:span text:style-name="T2"> dati utilizzat</text:span><text:span text:style-name="T4">a per la ricerca</text:span><text:span text:style-name="T2">, </text:span><text:span text:style-name="T4">la gestione della frontiera,</text:span><text:span text:style-name="T2"> la completezza, l’ottimalità </text:span>e <text:span text:style-name="T2">la</text:span> <text:span text:style-name="T2">complessità dell’algoritmo, sia in termini di spazio che di tempo</text:span>. </text:p>
          <text:p text:style-name="P7">* X <text:span text:style-name="T6">può</text:span> essere <text:span text:style-name="T6">uno</text:span> degli algoritmi standard studiati a lezione es: BFS, DFS, IDS, A* </text:p>
          <text:p text:style-name="P1"/>
        </text:list-item>
        <text:list-item>
          <text:p text:style-name="P3">Descrivere <text:span text:style-name="T4">l’algoritmo MiniMax, specificando </text:span><text:span text:style-name="T5">il tipo di</text:span><text:span text:style-name="T4"> giochi </text:span><text:span text:style-name="T5">a cui si può applicare</text:span><text:span text:style-name="T4">, </text:span><text:span text:style-name="T5">citandone complessità e difficoltà generali di applicazione. Descrivere la tecnica alpha-beta pruning e gli efficentamenti che essa può generare.</text:span><text:span text:style-name="T4"> <text:s/></text:span></text:p>
          <text:p text:style-name="P1"/>
        </text:list-item>
        <text:list-item>
          <text:p text:style-name="P1"><text:span text:style-name="T6">Descrivere, preveribilmente in pseudodice, l’algoritmo Recursive Best First Search specificandone vantaggi e svantaggi, in particolare rispetto alla gestione della memoria</text:span></text:p>
          <text:p text:style-name="P1"/>
        </text:list-item>
        <text:list-item>
          <text:p text:style-name="P8">Descrivere <text:span text:style-name="T7">formalmente</text:span> il problema d<text:span text:style-name="T7">i</text:span> ricerca nello spazio degli stati <text:span text:style-name="T7">(def. initial state, actions(s), results(s,a) …) e le sue soluzioni.</text:span></text:p>
          <text:p text:style-name="P8"/>
        </text:list-item>
        <text:list-item>
          <text:p text:style-name="P10">Specificare le proprietà con cui vengono caratterizzati gli ambienti operativi dell’intelligenza artificiale, fornendo anche degli esempi.</text:p>
          <text:p text:style-name="P10"/>
        </text:list-item>
        <text:list-item>
          <text:p text:style-name="P11">Definire le 4 misure di prestazione che vengono solitamente usate per gli algoritmi in ambito AI.</text:p>
        </text:list-item>
      </text:list>
      <text:p text:style-name="P12"/>
      <text:list xml:id="list114650081734734" text:continue-numbering="true" text:style-name="L1">
        <text:list-item>
          <text:p text:style-name="P11">Descrivere brevemente il concetto di euristica e la differenza fra le strategie di ricerca non informata e ricerca informata.</text:p>
          <text:p text:style-name="P11"/>
        </text:list-item>
        <text:list-item>
          <text:p text:style-name="P11">Definire formalmente un gioco a somma zero con due giocatori.</text:p>
          <text:p text:style-name="P11"/>
        </text:list-item>
        <text:list-item>
          <text:p text:style-name="P11">Dat<text:span text:style-name="T9">i un problema e </text:span>un albero di ricerca, specificare l’ordine di visita dei nodi, <text:span text:style-name="T9">la struttura dati usata per la gestione della frontiera</text:span> <text:span text:style-name="T8">e </text:span><text:span text:style-name="T9">il suo contenuto</text:span><text:span text:style-name="T8"> </text:span><text:span text:style-name="T9">quando si applica</text:span> un certo algoritm<text:span text:style-name="T8">o.</text:span></text:p>
        </text:list-item>
      </text:list>
      <text:p text:style-name="P12"/>
      <text:p text:style-name="P12"/>
      <text:p text:style-name="P12"/>
      <text:p text:style-name="P9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le </meta:initial-creator>
    <meta:creation-date>2016-04-27T13:13:31.044849835</meta:creation-date>
    <dc:date>2022-11-13T11:46:48.452000000</dc:date>
    <meta:editing-duration>PT3H2M33S</meta:editing-duration>
    <meta:editing-cycles>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" meta:word-count="247" meta:character-count="1695" meta:non-whitespace-character-count="1465"/>
  </office:meta>
</office:document-meta>
</file>